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officeooo:paragraph-rsid="00043269"/>
    </style:style>
    <style:style style:name="P2" style:family="paragraph" style:parent-style-name="Text_20_body">
      <style:paragraph-properties fo:text-align="left" style:justify-single-word="false"/>
      <style:text-properties style:font-name="times new roman" officeooo:paragraph-rsid="00043269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times new roman"/>
    </style:style>
    <style:style style:name="P4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times new roman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times new roman" fo:font-weight="bold"/>
    </style:style>
    <style:style style:name="P6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times new roman"/>
    </style:style>
    <style:style style:name="P7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times new roman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times new roman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times new roman" fo:font-style="italic"/>
    </style:style>
    <style:style style:name="P12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times new roman"/>
    </style:style>
    <style:style style:name="P13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times new roman"/>
    </style:style>
    <style:style style:name="P1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5" style:family="paragraph" style:parent-style-name="Standard">
      <style:text-properties style:font-name="times new roman" officeooo:rsid="00043269" officeooo:paragraph-rsid="00043269"/>
    </style:style>
    <style:style style:name="T1" style:family="text">
      <style:text-properties fo:font-weight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/>
    </style:style>
    <style:style style:name="T4" style:family="text">
      <style:text-properties fo:font-style="italic"/>
    </style:style>
    <style:style style:name="T5" style:family="text">
      <style:text-properties officeooo:rsid="00043269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his is a massive milestone for your infrastructure. Moving from scattered server logs to a centralized, production-ready observability stack is exactly what separates early-stage projects from mature tech companies.</text:p>
      <text:section text:style-name="Sect1" text:name="model-response-message-contentr_a6c66da674e02615">
        <text:p text:style-name="P3">Here is a clean, professionally formatted summary designed specifically to be copied and pasted directly into your team's Slack, Microsoft Teams, or Confluence wiki.</text:p>
        <text:h text:style-name="P4" text:outline-level="1">🏗️ Architecture Overview: Our Production Observability Stack</text:h>
        <text:p text:style-name="P5">Team,</text:p>
        <text:p text:style-name="P3">As we scale our mobile and web applications, having real-time visibility into our infrastructure's health is no longer optional—it's critical. We have officially deployed a centralized <text:span text:style-name="T1">PLG (Prometheus, Loki, Grafana) Observability Stack</text:span>.</text:p>
        <text:p text:style-name="P3">To maximize performance and minimize infrastructure costs, this is built as a <text:span text:style-name="T1">Single-Node Deployment</text:span> utilizing a <text:span text:style-name="T1">Subdomain Reverse Proxy</text:span> architecture.</text:p>
        <text:p text:style-name="P3">Here is a breakdown of how the system works, why it was chosen, and how it keeps our data secure.</text:p>
        <text:h text:style-name="P6" text:outline-level="3">🧩 1. The Core Components</text:h>
        <text:p text:style-name="P3">Instead of a single, fragile "god container," our monitoring stack is decoupled into highly specialized, resource-capped microservices:</text:p>
        <text:list text:style-name="L1">
          <text:list-item>
            <text:p text:style-name="P7"><text:span text:style-name="T1">Prometheus (The Metric Vacuum):</text:span> Actively scrapes our servers and containers every 15 seconds to track CPU, RAM, and network health.</text:p>
          </text:list-item>
          <text:list-item>
            <text:p text:style-name="P7"><text:span text:style-name="T1">Promtail &amp; Loki (The Log Vault):</text:span> Promtail automatically intercepts all text logs generated by our applications and streams them directly into Loki for high-speed, centralized querying.</text:p>
          </text:list-item>
          <text:list-item>
            <text:p text:style-name="P7"><text:span text:style-name="T1">Grafana (The Command Center):</text:span> The single pane of glass. It reads the data from Prometheus and Loki to generate our real-time dashboards and trigger alerts.</text:p>
          </text:list-item>
          <text:list-item>
            <text:p text:style-name="P7"><text:span text:style-name="T1">Nginx (The Bouncer):</text:span> Our reverse proxy that handles all incoming web traffic, encrypts it, and safely routes it to Grafana.</text:p>
          </text:list-item>
        </text:list>
        <text:h text:style-name="P6" text:outline-level="3">🚦 2. The Traffic Flow &amp; Subdomain Routing</text:h>
        <text:p text:style-name="P8"><text:span text:style-name="T2">We are utilizing the </text:span><text:span text:style-name="T3">Subdomain + Nginx Method</text:span><text:span text:style-name="T2"> (</text:span><text:span text:style-name="Source_20_Text"><text:span text:style-name="T2">monitor.ourdomain.com</text:span></text:span><text:span text:style-name="T2">) to access our telemetry globally without compromising server security.</text:span></text:p>
        <text:list text:style-name="L2">
          <text:list-item>
            <text:p text:style-name="P9"><text:span text:style-name="T3">The Request:</text:span><text:span text:style-name="T2"> An engineer visits our secure </text:span><text:span text:style-name="Source_20_Text"><text:span text:style-name="T2">https://monitor...</text:span></text:span><text:span text:style-name="T2"> subdomain from their browser.</text:span></text:p>
          </text:list-item>
          <text:list-item>
            <text:p text:style-name="P10"><text:span text:style-name="T1">The Firewall:</text:span> Our server's UFW (Uncomplicated Firewall) strictly blocks Port 3000 (Grafana). It <text:span text:style-name="T4">only</text:span> allows traffic on Ports 80 and 443.</text:p>
          </text:list-item>
          <text:list-item>
            <text:p text:style-name="P10"><text:span text:style-name="T1">The Proxy:</text:span> Nginx intercepts the traffic at the gate, validates the SSL certificate, and securely proxies the engineer into the internal Docker network where Grafana lives.</text:p>
          </text:list-item>
        </text:list>
        <text:p text:style-name="P11">Result: We get the convenience of a web link, but hackers cannot scan or bypass our firewall to attack the databases directly.</text:p>
        <text:h text:style-name="P6" text:outline-level="3"><text:soft-page-break/>🛡️ 3. Production Safeguards Applied</text:h>
        <text:p text:style-name="P3">To ensure this stack never crashes our actual business applications, three strict guardrails have been implemented:</text:p>
        <text:list text:style-name="L3">
          <text:list-item>
            <text:p text:style-name="P12"><text:span text:style-name="T1">Container Isolation:</text:span> If a log parser crashes, only that specific container restarts. Our web apps and databases remain unaffected (limiting the "blast radius").</text:p>
          </text:list-item>
          <text:list-item>
            <text:p text:style-name="P12"><text:span text:style-name="T1">Data Persistence (Volumes):</text:span> All metrics and logs are permanently mapped to the physical hard drive. If the server reboots or Docker updates, zero historical data is lost.</text:p>
          </text:list-item>
          <text:list-item>
            <text:p text:style-name="P12"><text:span text:style-name="T1">Automated Data Retention:</text:span> To prevent the hard drives from hitting 100% capacity and freezing the server, Prometheus and Loki are configured with strict TTL (Time to Live) retention limits. Old data is automatically purged.</text:p>
          </text:list-item>
        </text:list>
        <text:h text:style-name="P6" text:outline-level="3">💡 4. Why We Chose the PLG Stack</text:h>
        <text:list text:style-name="L4">
          <text:list-item>
            <text:p text:style-name="P13"><text:span text:style-name="T1">Zero Licensing Costs:</text:span> By self-hosting these enterprise-grade open-source tools, we avoid the massive $5,000+/month bills associated with SaaS platforms like Datadog or New Relic.</text:p>
          </text:list-item>
          <text:list-item>
            <text:p text:style-name="P13"><text:span text:style-name="T1">Absolute Data Privacy:</text:span> Our application logs, user data, and system metrics never leave our private server. We are not shipping sensitive telemetry to third-party clouds.</text:p>
          </text:list-item>
          <text:list-item>
            <text:p text:style-name="P14"><text:span text:style-name="T3">CI/CD &amp; Automation Ready:</text:span><text:span text:style-name="T2"> Because the entire architecture is defined in a single </text:span><text:span text:style-name="Source_20_Text"><text:span text:style-name="T2">docker-compose.yml</text:span></text:span><text:span text:style-name="T2"> file, it is completely portable. We can tear it down, move it, or replicate it to new environments in seconds.</text:span></text:p>
          </text:list-item>
        </text:list>
        <text:p text:style-name="P3">This infrastructure ensures that when traffic spikes or an application throws an error, we aren't guessing—we have the exact root cause on screen in milliseconds.</text:p>
      </text:section>
      <text:p text:style-name="P1"/>
      <text:p text:style-name="P1"/>
      <text:p text:style-name="P15">Dashboard Name : Docker Container Monitoring — Telegraf + Prometheus(no CAdvisor)</text:p>
      <text:p text:style-name="P1"><text:span text:style-name="T5">Dashboard ID : </text:span>25012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16:20:37.530187516</meta:creation-date>
    <dc:date>2026-05-25T16:27:24.657535789</dc:date>
    <meta:editing-duration>PT6M52S</meta:editing-duration>
    <meta:editing-cycles>1</meta:editing-cycles>
    <meta:document-statistic meta:table-count="0" meta:image-count="0" meta:object-count="0" meta:page-count="2" meta:paragraph-count="31" meta:word-count="603" meta:character-count="3957" meta:non-whitespace-character-count="3399"/>
    <meta:generator>LibreOffice/26.2.3.2$Linux_X86_64 LibreOffice_project/d4d5ed47b6084125f28d269a5650105d54dde034</meta:generator>
  </office:meta>
</office:document-meta>
</file>